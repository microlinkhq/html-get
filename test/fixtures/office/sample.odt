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lorem-ipsum"/>Lorem ipsum<text:bookmark-end text:name="lorem-ipsum"/></text:h>
      <text:p text:style-name="First_20_paragraph">Lorem ipsum dolor sit amet, consectetur adipiscing elit.</text:p>
      <text:list text:style-name="L1">
        <text:list-item>
          <text:p text:style-name="P1">alpha</text:p>
        </text:list-item>
        <text:list-item>
          <text:p text:style-name="P1">bet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30T17:38:12Z</meta:creation-date>
    <dc:date>2026-06-30T17:38:12Z</dc:date>
  </office:meta>
</office:document-meta>
</file>